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0F0000017384D4958C.png" manifest:media-type="image/png"/>
  <manifest:file-entry manifest:full-path="Pictures/100000010000016E000001EE7F53F9A2.png" manifest:media-type="image/png"/>
  <manifest:file-entry manifest:full-path="Pictures/10000001000003930000031DF0D0065E.png" manifest:media-type="image/png"/>
  <manifest:file-entry manifest:full-path="Pictures/10000001000000A5000000369CD18665.png" manifest:media-type="image/png"/>
  <manifest:file-entry manifest:full-path="Pictures/1000000100000575000001D53127E95D.png" manifest:media-type="image/png"/>
  <manifest:file-entry manifest:full-path="Pictures/100000010000027200000071DFB5595C.png" manifest:media-type="image/png"/>
  <manifest:file-entry manifest:full-path="Pictures/100000010000012000000125451648BF.png" manifest:media-type="image/png"/>
  <manifest:file-entry manifest:full-path="Pictures/10000001000002DC0000033FBE0F74DE.png" manifest:media-type="image/png"/>
  <manifest:file-entry manifest:full-path="Pictures/10000001000002DC0000033F591A0CFD.png" manifest:media-type="image/png"/>
  <manifest:file-entry manifest:full-path="Pictures/10000001000002840000011C9303AE74.png" manifest:media-type="image/png"/>
  <manifest:file-entry manifest:full-path="Pictures/10000001000000FD0000003D891DCEA2.png" manifest:media-type="image/png"/>
  <manifest:file-entry manifest:full-path="Pictures/100000010000017300000136EF3B0E04.png" manifest:media-type="image/png"/>
  <manifest:file-entry manifest:full-path="Pictures/100000010000060F0000002F69025ECE.png" manifest:media-type="image/png"/>
  <manifest:file-entry manifest:full-path="Pictures/100000010000027700000326C755B9EB.png" manifest:media-type="image/png"/>
  <manifest:file-entry manifest:full-path="Pictures/1000000100000287000001B5BBAB1A5A.png" manifest:media-type="image/png"/>
  <manifest:file-entry manifest:full-path="Pictures/1000000100000226000000B1B67C767F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itle">
      <style:text-properties officeooo:rsid="000fecac" officeooo:paragraph-rsid="000fecac"/>
    </style:style>
    <style:style style:name="P2" style:family="paragraph" style:parent-style-name="Subtitle">
      <style:text-properties officeooo:rsid="000fecac" officeooo:paragraph-rsid="000fecac"/>
    </style:style>
    <style:style style:name="P3" style:family="paragraph" style:parent-style-name="Standard">
      <style:text-properties officeooo:rsid="000a9d83" officeooo:paragraph-rsid="000a9d83"/>
    </style:style>
    <style:style style:name="P4" style:family="paragraph" style:parent-style-name="Standard">
      <style:text-properties officeooo:rsid="000bf7f7" officeooo:paragraph-rsid="000bf7f7"/>
    </style:style>
    <style:style style:name="P5" style:family="paragraph" style:parent-style-name="Standard">
      <style:text-properties officeooo:rsid="000bf7f7" officeooo:paragraph-rsid="000d096c"/>
    </style:style>
    <style:style style:name="P6" style:family="paragraph" style:parent-style-name="Standard">
      <style:text-properties officeooo:rsid="000d096c" officeooo:paragraph-rsid="000d096c"/>
    </style:style>
    <style:style style:name="P7" style:family="paragraph" style:parent-style-name="Standard">
      <style:text-properties officeooo:rsid="000d096c" officeooo:paragraph-rsid="000f694a"/>
    </style:style>
    <style:style style:name="P8" style:family="paragraph" style:parent-style-name="Standard">
      <style:text-properties officeooo:rsid="000d9e38" officeooo:paragraph-rsid="000d9e38"/>
    </style:style>
    <style:style style:name="P9" style:family="paragraph" style:parent-style-name="Standard">
      <style:text-properties officeooo:rsid="000d9e38" officeooo:paragraph-rsid="000eb26b"/>
    </style:style>
    <style:style style:name="P10" style:family="paragraph" style:parent-style-name="Standard">
      <style:text-properties officeooo:rsid="000eb26b" officeooo:paragraph-rsid="000eb26b"/>
    </style:style>
    <style:style style:name="P11" style:family="paragraph" style:parent-style-name="Standard">
      <style:paragraph-properties style:writing-mode="lr-tb" style:writing-mode-automatic="false"/>
      <style:text-properties officeooo:rsid="000eb26b" officeooo:paragraph-rsid="000eb26b"/>
    </style:style>
    <style:style style:name="P12" style:family="paragraph" style:parent-style-name="Standard">
      <style:text-properties fo:font-weight="bold" officeooo:rsid="000eb26b" officeooo:paragraph-rsid="000eb26b" style:font-weight-asian="bold" style:font-weight-complex="bold"/>
    </style:style>
    <style:style style:name="P13" style:family="paragraph" style:parent-style-name="Standard">
      <style:text-properties fo:font-weight="bold" officeooo:rsid="000f44a5" officeooo:paragraph-rsid="000f44a5" style:font-weight-asian="bold" style:font-weight-complex="bold"/>
    </style:style>
    <style:style style:name="P14" style:family="paragraph" style:parent-style-name="Standard">
      <style:text-properties fo:font-weight="normal" officeooo:rsid="000f44a5" officeooo:paragraph-rsid="000f44a5" style:font-weight-asian="normal" style:font-weight-complex="normal"/>
    </style:style>
    <style:style style:name="P15" style:family="paragraph" style:parent-style-name="Standard">
      <style:text-properties officeooo:rsid="000f44a5" officeooo:paragraph-rsid="000f44a5"/>
    </style:style>
    <style:style style:name="P16" style:family="paragraph" style:parent-style-name="Standard">
      <style:text-properties fo:font-style="italic" officeooo:rsid="000f44a5" officeooo:paragraph-rsid="000f44a5" style:font-style-asian="italic" style:font-style-complex="italic"/>
    </style:style>
    <style:style style:name="P17" style:family="paragraph" style:parent-style-name="Standard">
      <style:text-properties fo:font-style="normal" fo:font-weight="bold" officeooo:rsid="000f44a5" officeooo:paragraph-rsid="000f44a5" style:font-style-asian="normal" style:font-weight-asian="bold" style:font-style-complex="normal" style:font-weight-complex="bold"/>
    </style:style>
    <style:style style:name="P18" style:family="paragraph" style:parent-style-name="Standard">
      <style:text-properties fo:font-style="normal" officeooo:rsid="000f44a5" officeooo:paragraph-rsid="000f44a5" style:font-style-asian="normal" style:font-style-complex="normal"/>
    </style:style>
    <style:style style:name="P19" style:family="paragraph" style:parent-style-name="Standard">
      <style:text-properties fo:font-style="italic" officeooo:rsid="000f44a5" officeooo:paragraph-rsid="000f44a5" fo:background-color="#ff0000" style:font-style-asian="italic" style:font-style-complex="italic"/>
    </style:style>
    <style:style style:name="P20" style:family="paragraph" style:parent-style-name="Heading_20_2">
      <style:text-properties officeooo:paragraph-rsid="000f694a"/>
    </style:style>
    <style:style style:name="P21" style:family="paragraph" style:parent-style-name="Standard">
      <style:paragraph-properties style:writing-mode="lr-tb" style:writing-mode-automatic="false"/>
      <style:text-properties officeooo:rsid="000d096c" officeooo:paragraph-rsid="000f694a"/>
    </style:style>
    <style:style style:name="P22" style:family="paragraph" style:parent-style-name="Standard">
      <style:paragraph-properties style:writing-mode="lr-tb" style:writing-mode-automatic="false"/>
      <style:text-properties officeooo:rsid="000f694a" officeooo:paragraph-rsid="000f694a"/>
    </style:style>
    <style:style style:name="P23" style:family="paragraph" style:parent-style-name="Standard">
      <style:text-properties officeooo:rsid="000f694a" officeooo:paragraph-rsid="000f694a"/>
    </style:style>
    <style:style style:name="T1" style:family="text">
      <style:text-properties officeooo:rsid="000fecac"/>
    </style:style>
    <style:style style:name="T2" style:family="text">
      <style:text-properties fo:font-style="italic" fo:background-color="#ff0000" loext:char-shading-value="0" style:font-style-asian="italic" style:font-style-complex="itali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0d096c"/>
    </style:style>
    <style:style style:name="T5" style:family="text">
      <style:text-properties officeooo:rsid="000eb26b"/>
    </style:style>
    <style:style style:name="T6" style:family="text">
      <style:text-properties fo:font-style="italic" officeooo:rsid="000f44a5" fo:background-color="#ff0000" loext:char-shading-value="0" style:font-style-asian="italic" style:font-style-complex="italic"/>
    </style:style>
    <style:style style:name="T7" style:family="text">
      <style:text-properties officeooo:rsid="000f694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peria</text:p>
      <text:p text:style-name="P2">Quick Guide (rough, very)</text:p>
      <text:h text:style-name="Heading_20_1" text:outline-level="1">Men<text:span text:style-name="T1">u</text:span>s</text:h>
      <text:h text:style-name="Heading_20_2" text:outline-level="2">Icon toolbar (top/right screen)</text:h>
      <text:p text:style-name="P3"><draw:frame draw:style-name="fr1" draw:name="Image1" text:anchor-type="char" svg:x="-0.0409in" svg:y="0.1055in" svg:width="1.7189in" svg:height="0.5626in" draw:z-index="0"><draw:image xlink:href="Pictures/10000001000000A5000000369CD18665.png" xlink:type="simple" xlink:show="embed" xlink:actuate="onLoad" draw:mime-type="image/png"/></draw:frame></text:p>
      <text:p text:style-name="P3"/>
      <text:p text:style-name="P3"/>
      <text:p text:style-name="P3"/>
      <text:p text:style-name="P3">1) Refresh. Load data from database, in case there have been an update (from another user working on the same customer) Refresh also happens at a regular interval (30 seconds), the interval time can be configured in Operia Configuration → General → Refresh Interval</text:p>
      <text:p text:style-name="P3"/>
      <text:p text:style-name="P3">2) Feedback. Allows the user to come with bug reports or ideas for improvements. Entries can be read in Operia Configuration → Feedback</text:p>
      <text:p text:style-name="P3"/>
      <text:p text:style-name="P3">3) Search. Not yet implemented.</text:p>
      <text:p text:style-name="P3"/>
      <text:p text:style-name="P3">4) Account Menu</text:p>
      <text:p text:style-name="P3"><draw:frame draw:style-name="fr1" draw:name="Image2" text:anchor-type="char" svg:x="0.0161in" svg:y="0.1465in" svg:width="3in" svg:height="3.052in" draw:z-index="1"><draw:image xlink:href="Pictures/100000010000012000000125451648BF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1) Account. Takes you to the account page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Heading_20_3" text:outline-level="3">Account Page</text:h>
      <text:p text:style-name="P3"><draw:frame draw:style-name="fr1" draw:name="Image3" text:anchor-type="char" svg:x="-0.0307in" svg:y="-0.0035in" svg:width="3.0791in" svg:height="3.4953in" draw:z-index="2"><draw:image xlink:href="Pictures/10000001000002DC0000033FBE0F74DE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/>
      <text:p text:style-name="P4">The user can change his Name, Username, Email. Username is used for display on the web; First, Last name are used for email, SMS, etc.</text:p>
      <text:p text:style-name="P4"/>
      <text:p text:style-name="P4">Appearance. Choose same theme as computer (only supported on some OS), dark or light mode.</text:p>
      <text:p text:style-name="P4"><draw:frame draw:style-name="fr1" draw:name="Image4" text:anchor-type="char" svg:x="0.002in" svg:y="0.0917in" svg:width="2.8953in" svg:height="3.2866in" draw:z-index="3"><draw:image xlink:href="Pictures/10000001000002DC0000033F591A0CFD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>Navigation. Classic: all menu-items are available on the sidebar. Modern: Only the package flow menu-items are visible (<text:span text:style-name="T2">should also be Asset flow I think</text:span>), and displayed as buttons instead of menu-texts. All the remaining functionality is available from the start menu (bottom/left).</text:p>
      <text:p text:style-name="P4"/>
      <text:p text:style-name="P4">Language. Select language. Only Danish/English for now. Others can easily be added.</text:p>
      <text:p text:style-name="P4"/>
      <text:p text:style-name="P4">QR. Take picture or download for Mobile Android app install. The QR code is just an url pointing to the Supabase Amazon S3 bucket containing the APK.</text:p>
      <text:p text:style-name="P4"/>
      <text:p text:style-name="P4">Configuration</text:p>
      <text:p text:style-name="P4"/>
      <text:p text:style-name="P4">There are two configuration levels: Operia Configuration and Customer Configuration.</text:p>
      <text:p text:style-name="P4"><text:span text:style-name="T3">Operia Configuration</text:span> is site-wise configuration options. They’re either system wise configurations (applicable for all customers), or determine the functionality which is available application-wise (for all customers), or functions as a template for configurations of new customers – depending on which Operia Configuration is chosen. <text:span text:style-name="T4">Only Super-users can see the Operia Configuration.</text:span></text:p>
      <text:p text:style-name="P5"><text:span text:style-name="T3">Customer Configuration</text:span> are configuration settings for a single customer. Will override the Operia Configuration, when the Operia Configuration is a template for Customer Configurations. <text:s/><text:span text:style-name="T4">Only Managers (&amp; Super-users) can see the Operia Configuration.</text:span></text:p>
      <text:p text:style-name="P4"/>
      <text:p text:style-name="P6">The two configurations can be found at 1) the bottom of the side-menu (classic navigation layout), or bottom of drop-down menu (modern navigation layout)</text:p>
      <text:p text:style-name="P6"><draw:frame draw:style-name="fr1" draw:name="Image5" text:anchor-type="char" svg:x="0.0055in" svg:y="0.1173in" svg:width="2.6354in" svg:height="0.6354in" draw:z-index="4"><draw:image xlink:href="Pictures/10000001000000FD0000003D891DCEA2.png" xlink:type="simple" xlink:show="embed" xlink:actuate="onLoad" draw:mime-type="image/png"/></draw:frame></text:p>
      <text:p text:style-name="P6"/>
      <text:p text:style-name="P4"/>
      <text:p text:style-name="P4"/>
      <text:p text:style-name="P4"/>
      <text:p text:style-name="P6">Operia Configuration has these items:</text:p>
      <text:p text:style-name="P6"/>
      <text:p text:style-name="P6">1) Customers</text:p>
      <text:p text:style-name="P6">2) Users</text:p>
      <text:p text:style-name="P6">3) Feedback</text:p>
      <text:p text:style-name="P6">4) General</text:p>
      <text:p text:style-name="P6">5) Products &amp; Features</text:p>
      <text:p text:style-name="P6">6) Home Design</text:p>
      <text:p text:style-name="P6">7) Handheld Design</text:p>
      <text:p text:style-name="P6">8) Carriers</text:p>
      <text:p text:style-name="P6">9) Shipping &amp; Billing</text:p>
      <text:p text:style-name="P6">10) Assets</text:p>
      <text:p text:style-name="P6">11) Maps &amp; Routes</text:p>
      <text:p text:style-name="P6">12) Data Transfer</text:p>
      <text:p text:style-name="P6">13) API Keys</text:p>
      <text:p text:style-name="P6">14) Integrations</text:p>
      <text:p text:style-name="P6">15) Templates</text:p>
      <text:p text:style-name="P6">16) Localization</text:p>
      <text:p text:style-name="P6">17) Notifications</text:p>
      <text:p text:style-name="P6">18) Billing</text:p>
      <text:p text:style-name="P6">19) Logs</text:p>
      <text:p text:style-name="P6">20) Log Drains</text:p>
      <text:p text:style-name="P6"><text:soft-page-break/></text:p>
      <text:p text:style-name="P6">---</text:p>
      <text:h text:style-name="Heading_20_2" text:outline-level="2">1) <text:span text:style-name="T3">Customers</text:span>.</text:h>
      <text:p text:style-name="P7">This configurations shows all customers created in Operia. The table is a common feature used throughout the application. Top/Right: search/filter; all columns are sortable; leftmost column has checkboxes which can be selected/unselected by clicking on the checkbox, rightmost column has stars which can be starred/unstarred by clicking on the star / or by right-clicking on a row. Checkbox column header has a drop down menu, which at a minimum has these two items: Select All; Starred + more depending on which table it is. When one or more rows have been selected, a selected row will be displayed under the table: this has at a minimum these two icons (right-aligned): Show only selected; Delete Selected. Delete selected will popup a warning/confirmation dialog, where the user has to click on checkbox to confirm + type in “delete” (or “slet” in Danish) in their selected language.</text:p>
      <text:p text:style-name="P6"/>
      <text:p text:style-name="P6"/>
      <text:p text:style-name="P6"><draw:frame draw:style-name="fr2" draw:name="Image6" text:anchor-type="char" svg:width="6.6929in" svg:height="2.2465in" draw:z-index="5"><draw:image xlink:href="Pictures/1000000100000575000001D53127E95D.png" xlink:type="simple" xlink:show="embed" xlink:actuate="onLoad" draw:mime-type="image/png"/></draw:frame></text:p>
      <text:p text:style-name="P6"><draw:frame draw:style-name="fr1" draw:name="Image7" text:anchor-type="char" svg:x="0.0307in" svg:y="0.0598in" svg:width="2.011in" svg:height="1.6807in" draw:z-index="6"><draw:image xlink:href="Pictures/100000010000017300000136EF3B0E04.png" xlink:type="simple" xlink:show="embed" xlink:actuate="onLoad" draw:mime-type="image/png"/></draw:frame></text:p>
      <text:p text:style-name="P6"/>
      <text:p text:style-name="P4"/>
      <text:p text:style-name="P4"/>
      <text:p text:style-name="P4">‘</text:p>
      <text:p text:style-name="P4"/>
      <text:p text:style-name="P4"/>
      <text:p text:style-name="P4"/>
      <text:p text:style-name="P8"/>
      <text:p text:style-name="P8"/>
      <text:p text:style-name="P8">Clicking on a row displays a detail pane (or most tables) with two or more tabs. The leftmost tab is always “Details”, and the rightmost tab is always “Actions.” <text:span text:style-name="T5">To the right of Actions, is always two icons: Maximize/Normalize (maximize/normalize the detail pane), and a “X” to remove the detail pane.</text:span></text:p>
      <text:p text:style-name="P8"/>
      <text:p text:style-name="P9"><text:span text:style-name="T5">The </text:span><text:span text:style-name="T3">Details</text:span> <text:span text:style-name="T5">tab </text:span>typically has:</text:p>
      <text:p text:style-name="P9">ID of the selected id (in a non-editable field + copy-to-clipboard icon). The ID is Operia’s internal ID, and used for <text:span text:style-name="T5">issue tracking if a customer calls in with a problem.</text:span></text:p>
      <text:p text:style-name="P8"/>
      <text:p text:style-name="P10">Name, Description, Notes – where available. And on Customers also: “Reg no.”</text:p>
      <text:p text:style-name="P10"/>
      <text:p text:style-name="P10">Any changes will always display the Cancel/Save Changes bar at the bottom of the screen. Such that you always know precisely where it is.</text:p>
      <text:p text:style-name="P10"><text:soft-page-break/></text:p>
      <text:p text:style-name="P10">The <text:span text:style-name="T3">Action</text:span> tab typically has a delete function. With the same popup warning dialog.</text:p>
      <text:p text:style-name="P10">And on Customers also a button to deactivate a customer (can be re-activated)</text:p>
      <text:p text:style-name="P10"/>
      <text:p text:style-name="P10"><draw:frame draw:style-name="fr2" draw:name="Image8" text:anchor-type="char" svg:width="6.6929in" svg:height="0.2028in" draw:z-index="7"><draw:image xlink:href="Pictures/100000010000060F0000002F69025ECE.png" xlink:type="simple" xlink:show="embed" xlink:actuate="onLoad" draw:mime-type="image/png"/></draw:frame></text:p>
      <text:p text:style-name="P10">On Customers, the other tabs are:</text:p>
      <text:p text:style-name="P11">1) Products</text:p>
      <text:p text:style-name="P10">2) Billing</text:p>
      <text:p text:style-name="P10">3) Shipping &amp; Billing</text:p>
      <text:p text:style-name="P10">4) Logo</text:p>
      <text:p text:style-name="P10">5) Localization</text:p>
      <text:p text:style-name="P10">6) Appearance</text:p>
      <text:p text:style-name="P10">7) Data Transfer</text:p>
      <text:p text:style-name="P10">8) Log Drains</text:p>
      <text:p text:style-name="P10"/>
      <text:p text:style-name="P10"><text:span text:style-name="T3">Products</text:span>. </text:p>
      <text:p text:style-name="P10"><draw:frame draw:style-name="fr1" draw:name="Image9" text:anchor-type="char" svg:x="-0.0035in" svg:y="0.0575in" svg:width="3.5453in" svg:height="4.528in" draw:z-index="8"><draw:image xlink:href="Pictures/100000010000027700000326C755B9EB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Here the Customer can be given access to products &amp; Features. Features belong to Products, and only the Features of the activates Products are shown. Products and Features can also be given an expiry date.</text:p>
      <text:p text:style-name="P10"/>
      <text:p text:style-name="P12">Billing</text:p>
      <text:p text:style-name="P10"><draw:frame draw:style-name="fr1" draw:name="Image10" text:anchor-type="char" svg:x="-0.0327in" svg:y="0.052in" svg:width="6.5209in" svg:height="1.1772in" draw:z-index="9"><draw:image xlink:href="Pictures/100000010000027200000071DFB5595C.png" xlink:type="simple" xlink:show="embed" xlink:actuate="onLoad" draw:mime-type="image/png"/></draw:frame><text:soft-page-break/></text:p>
      <text:p text:style-name="P10">Only has this one configuration: purchasing email. <text:span text:style-name="T2">This configuration option should be move</text:span><text:span text:style-name="T6">d</text:span><text:span text:style-name="T2"> </text:span><text:span text:style-name="T6">under Details</text:span><text:span text:style-name="T2">.</text:span></text:p>
      <text:p text:style-name="P10"/>
      <text:p text:style-name="P13">Shipping &amp; Billing</text:p>
      <text:p text:style-name="P14">Select Margin or BYOC</text:p>
      <text:p text:style-name="P10"><draw:frame draw:style-name="fr1" draw:name="Image11" text:anchor-type="char" svg:x="0.0161in" svg:y="0.1043in" svg:width="3.2902in" svg:height="1.4516in" draw:z-index="10"><draw:image xlink:href="Pictures/10000001000002840000011C9303AE74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/>
      <text:p text:style-name="P10"><draw:frame draw:style-name="fr1" draw:name="Image12" text:anchor-type="char" svg:x="0.0252in" svg:y="-0.5299in" svg:width="3.3984in" svg:height="2.2953in" draw:z-index="11"><draw:image xlink:href="Pictures/1000000100000287000001B5BBAB1A5A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3">Logo</text:p>
      <text:p text:style-name="P15">Upload a customer logo. <text:span text:style-name="T2">I think the menu is deprecated, as the functionality has been moved under Home Design.</text:span></text:p>
      <text:p text:style-name="P16"/>
      <text:p text:style-name="P17">Localization</text:p>
      <text:p text:style-name="P18">Select language (templates, etc.), currency (used in Shipping &amp; Billing), and timezone.</text:p>
      <text:p text:style-name="P18"/>
      <text:p text:style-name="P17">Appearance</text:p>
      <text:p text:style-name="P18">Change colours, texts of individual products. <text:span text:style-name="T2">This features has not been implemented throughout, not sure if it is still required.</text:span></text:p>
      <text:p text:style-name="P18"/>
      <text:p text:style-name="P17">Data Transfer</text:p>
      <text:p text:style-name="P18">Enable / disable SFTP and/or Email data updates for this customer.</text:p>
      <text:p text:style-name="P18"><draw:frame draw:style-name="fr1" draw:name="Image13" text:anchor-type="char" svg:x="0.05in" svg:y="0.1839in" svg:width="3.111in" svg:height="1.0016in" draw:z-index="12"><draw:image xlink:href="Pictures/1000000100000226000000B1B67C767F.png" xlink:type="simple" xlink:show="embed" xlink:actuate="onLoad" draw:mime-type="image/png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7">Log Drains</text:p>
      <text:p text:style-name="P18">Automatically send log messages to a third party system. Either HML/NDJSON (generic) or Grafana Loki.</text:p>
      <text:p text:style-name="P19">This is an advanced feature which is usually only available for pro-packages.</text:p>
      <text:p text:style-name="P18"><draw:frame draw:style-name="fr1" draw:name="Image14" text:anchor-type="char" svg:x="0.011in" svg:y="0.15in" svg:width="2.2307in" svg:height="3.0102in" draw:z-index="13"><draw:image xlink:href="Pictures/100000010000016E000001EE7F53F9A2.png" xlink:type="simple" xlink:show="embed" xlink:actuate="onLoad" draw:mime-type="image/png"/></draw:frame><text:soft-page-break/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h text:style-name="P20" text:outline-level="2">1) <text:span text:style-name="T7">Users</text:span></text:h>
      <text:p text:style-name="P21">This configurations shows all <text:span text:style-name="T7">users</text:span>created in Operia. <text:span text:style-name="T7">Users are actually created in Supabase (Supabase → Dashboard → Project → Authentication) and only copied to Operia. For increased security and things like 2FA.</text:span></text:p>
      <text:p text:style-name="P21"/>
      <text:p text:style-name="P22">On the <text:span text:style-name="T3">Details</text:span> tab, the name and email can be changed.</text:p>
      <text:p text:style-name="P22"><text:span text:style-name="T3">Access</text:span> tab: give individual roles to the user. Currently these roles are defined:</text:p>
      <text:p text:style-name="P22"/>
      <text:p text:style-name="P22">1) Managers: access to everything (that is accessible on the customer. Customer managers, still do not have access to Operia configurations, or other customers, etc. - same as the current users) </text:p>
      <text:p text:style-name="P22"/>
      <text:p text:style-name="P22">- all pages the other roles can access, including customer configuration</text:p>
      <text:p text:style-name="P22"/>
      <text:p text:style-name="P22">2) Data Managers</text:p>
      <text:p text:style-name="P22">- can access the pages under Master Data; Employees, Departments, Lockers, Import/Export.</text:p>
      <text:p text:style-name="P22"/>
      <text:p text:style-name="P22">3) Package handlers</text:p>
      <text:p text:style-name="P22"/>
      <text:p text:style-name="P22">- can access the Parcel pages: Receive parcel, Hand out parcel.</text:p>
      <text:p text:style-name="P22"/>
      <text:p text:style-name="P22">4) Package managers</text:p>
      <text:p text:style-name="P22"/>
      <text:p text:style-name="P22">- in addition the pages of the Package handlers, can also access the parcel pages: Parcel Dashboard, Parcels, Parcel Reports, Parcel Statistics.</text:p>
      <text:p text:style-name="P22"/>
      <text:p text:style-name="P22">5) Handheld package handler</text:p>
      <text:p text:style-name="P22"/>
      <text:p text:style-name="P22">- Can register and hand out parcels on the handheld.</text:p>
      <text:p text:style-name="P22"/>
      <text:p text:style-name="P22">6) Asset handlers</text:p>
      <text:p text:style-name="P22"/>
      <text:p text:style-name="P22">- not yet defined.</text:p>
      <text:p text:style-name="P22"/>
      <text:p text:style-name="P22">7) Asset managers</text:p>
      <text:p text:style-name="P22"><text:soft-page-break/></text:p>
      <text:p text:style-name="P22">- can access all pages under Assets.</text:p>
      <text:p text:style-name="P22"/>
      <text:p text:style-name="P22">8) Handheld asset handler</text:p>
      <text:p text:style-name="P22"/>
      <text:p text:style-name="P22">- not yet defined.</text:p>
      <text:p text:style-name="P22"/>
      <text:p text:style-name="P22">9) Inventory handlers</text:p>
      <text:p text:style-name="P22"/>
      <text:p text:style-name="P22">- not yet defined.</text:p>
      <text:p text:style-name="P22"/>
      <text:p text:style-name="P22">10) Inventory managers</text:p>
      <text:p text:style-name="P22"/>
      <text:p text:style-name="P22">- can access all pages under inventory.</text:p>
      <text:p text:style-name="P22"/>
      <text:p text:style-name="P22">11) Handheld inventory handler</text:p>
      <text:p text:style-name="P22"/>
      <text:p text:style-name="P22">- not yet defined.</text:p>
      <text:p text:style-name="P22"/>
      <text:p text:style-name="P22">12) Route Planner handlers</text:p>
      <text:p text:style-name="P22"/>
      <text:p text:style-name="P22">- not yet defined.</text:p>
      <text:p text:style-name="P22"/>
      <text:p text:style-name="P22">13) Route Planner managers</text:p>
      <text:p text:style-name="P22"/>
      <text:p text:style-name="P22">- can access all pages under Route Planner.</text:p>
      <text:p text:style-name="P22"/>
      <text:p text:style-name="P22">14) Handheld Route Planner</text:p>
      <text:p text:style-name="P22"/>
      <text:p text:style-name="P22">- can use the route planner on the handheld</text:p>
      <text:p text:style-name="P7"><draw:frame draw:style-name="fr1" draw:name="Image15" text:anchor-type="char" svg:x="-0.0264in" svg:y="0.1252in" svg:width="6.0563in" svg:height="5.2752in" draw:z-index="14"><draw:image xlink:href="Pictures/10000001000003930000031DF0D0065E.png" xlink:type="simple" xlink:show="embed" xlink:actuate="onLoad" draw:mime-type="image/png"/></draw:frame><text:soft-page-break/></text:p>
      <text:p text:style-name="P7"/>
      <text:p text:style-name="P23"><text:span text:style-name="T3">Action</text:span> tab, has delete user (will also be deleted in Supabase) and change password</text:p>
      <text:p text:style-name="P23"><draw:frame draw:style-name="fr1" draw:name="Image16" text:anchor-type="char" svg:x="0.0445in" svg:y="0.0591in" svg:width="3.3811in" svg:height="2.3807in" draw:z-index="15"><draw:image xlink:href="Pictures/100000010000020F0000017384D4958C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23">New password can be explicitly written in (or automatically generated), or a link can be sent to the user, where he can change it himself.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7-23T19:56:31.600903622</meta:creation-date>
    <dc:date>2026-07-24T08:16:09.950628998</dc:date>
    <meta:editing-duration>PT29M20S</meta:editing-duration>
    <meta:editing-cycles>5</meta:editing-cycles>
    <meta:generator>LibreOffice/26.2.4.2$Linux_X86_64 LibreOffice_project/3346a99e6b841765b75a9b29714a5b95c6761ce3</meta:generator>
    <meta:document-statistic meta:table-count="0" meta:image-count="16" meta:object-count="0" meta:page-count="10" meta:paragraph-count="112" meta:word-count="1158" meta:character-count="7146" meta:non-whitespace-character-count="6095"/>
  </office:meta>
</office:document-meta>
</file>